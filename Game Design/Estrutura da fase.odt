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trada do cemitério</text:p>
      <text:p text:style-name="Standard"/>
      <text:p text:style-name="Standard">↓</text:p>
      <text:p text:style-name="Standard"/>
      <text:p text:style-name="Standard">Exploração</text:p>
      <text:p text:style-name="Standard"/>
      <text:p text:style-name="Standard">↓</text:p>
      <text:p text:style-name="Standard"/>
      <text:p text:style-name="Standard">🟢 Poção Verde</text:p>
      <text:p text:style-name="Standard">(protegida por inimigos)</text:p>
      <text:p text:style-name="Standard"/>
      <text:p text:style-name="Standard">↓</text:p>
      <text:p text:style-name="Standard"/>
      <text:p text:style-name="Standard">Exploração</text:p>
      <text:p text:style-name="Standard"/>
      <text:p text:style-name="Standard">↓</text:p>
      <text:p text:style-name="Standard"/>
      <text:p text:style-name="Standard">🟣 Poção Roxa</text:p>
      <text:p text:style-name="Standard">(protegida por inimigos)</text:p>
      <text:p text:style-name="Standard"/>
      <text:p text:style-name="Standard">↓</text:p>
      <text:p text:style-name="Standard"/>
      <text:p text:style-name="Standard">Exploração</text:p>
      <text:p text:style-name="Standard"/>
      <text:p text:style-name="Standard">↓</text:p>
      <text:p text:style-name="Standard"/>
      <text:p text:style-name="Standard">🔵 Poção Azul</text:p>
      <text:p text:style-name="Standard">(protegida por inimigos)</text:p>
      <text:p text:style-name="Standard"/>
      <text:p text:style-name="Standard">↓</text:p>
      <text:p text:style-name="Standard"/>
      <text:p text:style-name="Standard">Altar</text:p>
      <text:p text:style-name="Standard"/>
      <text:p text:style-name="Standard">↓</text:p>
      <text:p text:style-name="Standard"/>
      <text:p text:style-name="Standard">Portal aparece</text:p>
      <text:p text:style-name="Standard"/>
      <text:p text:style-name="Standard">↓</text:p>
      <text:p text:style-name="Standard"/>
      <text:p text:style-name="Standard">Saída do cemitéri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9T20:51:31.739940036</meta:creation-date>
    <dc:date>2026-07-09T20:52:06.097748824</dc:date>
    <meta:editing-duration>PT35S</meta:editing-duration>
    <meta:editing-cycles>1</meta:editing-cycles>
    <meta:document-statistic meta:table-count="0" meta:image-count="0" meta:object-count="0" meta:page-count="1" meta:paragraph-count="22" meta:word-count="39" meta:character-count="205" meta:non-whitespace-character-count="188"/>
    <meta:generator>LibreOffice/25.8.7.3$Linux_X86_64 LibreOffice_project/580$Build-3</meta:generator>
  </office:meta>
</office:document-meta>
</file>